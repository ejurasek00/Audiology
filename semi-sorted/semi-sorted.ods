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91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437in"/>
    </style:style>
    <style:style style:name="co6" style:family="table-column">
      <style:table-column-properties fo:break-before="auto" style:column-width="1.3618in"/>
    </style:style>
    <style:style style:name="co7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5c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5983b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2a6099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00" fo:border="0.74pt solid #000000"/>
    </style:style>
    <style:style style:name="ce8" style:family="table-cell" style:parent-style-name="Default">
      <style:table-cell-properties fo:background-color="#00a933" fo:border="0.74pt solid #000000"/>
    </style:style>
    <style:style style:name="ce9" style:family="table-cell" style:parent-style-name="Default">
      <style:table-cell-properties fo:background-color="transparent" fo:border="0.74pt solid #000000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Semi-sorted</text:p>
          </table:table-cell>
          <table:table-cell table:style-name="ce1" office:value-type="string" calcext:value-type="string">
            <text:p>Support count</text:p>
          </table:table-cell>
          <table:table-cell table:style-name="ce1" office:value-type="string" calcext:value-type="string">
            <text:p>Gemini 2.5 Pro</text:p>
          </table:table-cell>
          <table:table-cell table:style-name="ce1" office:value-type="string" calcext:value-type="string">
            <text:p>ChatGPT 5</text:p>
          </table:table-cell>
          <table:table-cell table:style-name="ce1" office:value-type="string" calcext:value-type="string">
            <text:p>Claude 4 Sonnet</text:p>
          </table:table-cell>
          <table:table-cell table:style-name="ce1" office:value-type="string" calcext:value-type="string">
            <text:p>mixtral-8x7b-instruct</text:p>
          </table:table-cell>
          <table:table-cell table:style-name="ce1" office:value-type="string" calcext:value-type="string">
            <text:p>llama-3.3-70b-instruct</text:p>
          </table:table-cell>
          <table:table-cell table:style-name="ce1" office:value-type="string" calcext:value-type="string">
            <text:p>mixtral-8x22b-instruct</text:p>
          </table:table-cell>
          <table:table-cell table:style-name="ce1" office:value-type="string" calcext:value-type="string">
            <text:p>Perplex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35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2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48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3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34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Orange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8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9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18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20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46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22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23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32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45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50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41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56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63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94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43}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6}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17}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40}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81}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4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{Gold}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{Berlin}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{1}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{Prague}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{Yuzu}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{SandyBrown}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{QR1777}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ce1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>
            <text:p>{1, Gold}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Yes</text:p>
          </table:table-cell>
          <table:table-cell table:number-columns-repeated="6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81, SandyBrown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94, SandyBrown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81, Yuzu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9, QR1777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Prague, Yuzu}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81, QR1777}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5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81, Prague}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SandyBrown, Yuzu}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4"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QR1777, Yuzu}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8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{QR1777, SandyBrown}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{Prague, SandyBrown}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{Prague, QR1777}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6" table:number-columns-repeated="2"/>
          <table:table-cell table:style-name="ce1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>
            <text:p>{81, QR1777, SandyBrown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81, Prague, SandyBrown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81, QR1777, Yuzu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81, Prague, QR1777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QR1777, SandyBrown, Yuzu}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Prague, SandyBrown, Yuzu}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4"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/>
          <table:table-cell table:style-name="ce8"/>
        </table:table-row>
        <table:table-row table:style-name="ro2">
          <table:table-cell table:style-name="ce2" office:value-type="string" calcext:value-type="string">
            <text:p>{Prague, QR1777, Yuzu}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{Prague, QR1777, SandyBrown}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6" table:number-columns-repeated="2"/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{81, Prague, QR1777, SandyBrown}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7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{Prague, QR1777, SandyBrown, Yuzu}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11"/>
          <table:table-cell table:number-columns-repeated="2"/>
        </table:table-row>
        <table:table-row table:style-name="ro2" table:number-rows-repeated="6">
          <table:table-cell table:number-columns-repeated="5"/>
          <table:table-cell table:style-name="ce10"/>
          <table:table-cell table:number-columns-repeated="6"/>
        </table:table-row>
        <table:table-row table:style-name="ro2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58:Sheet1.B5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3:40:58.376777912</meta:creation-date>
    <dc:date>2026-03-20T15:20:16.419213618</dc:date>
    <meta:editing-duration>PT32M48S</meta:editing-duration>
    <meta:editing-cycles>3</meta:editing-cycles>
    <meta:generator>LibreOffice/25.8.5.2$Linux_X86_64 LibreOffice_project/580$Build-2</meta:generator>
    <meta:document-statistic meta:table-count="1" meta:cell-count="504" meta:object-count="0"/>
  </office:meta>
</office:document-meta>
</file>